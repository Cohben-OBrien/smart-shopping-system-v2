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line-height="150%"/>
      <style:text-properties style:font-name="Arial" style:font-name-complex="Arial" fo:font-weight="bold" style:font-weight-asian="bold" style:font-weight-complex="bold" fo:font-size="14pt" style:font-size-asian="14pt" style:font-size-complex="14pt"/>
    </style:style>
    <style:style style:name="P2" style:parent-style-name="Normal" style:family="paragraph">
      <style:paragraph-properties fo:line-height="150%"/>
      <style:text-properties style:font-name="Arial" style:font-name-complex="Arial" fo:font-size="12pt" style:font-size-asian="12pt" style:font-size-complex="12pt"/>
    </style:style>
    <style:style style:name="P3" style:parent-style-name="Normal" style:family="paragraph">
      <style:paragraph-properties fo:line-height="150%"/>
      <style:text-properties style:font-name="Arial" style:font-name-complex="Arial" fo:font-size="12pt" style:font-size-asian="12pt" style:font-size-complex="12pt"/>
    </style:style>
    <style:style style:name="P4" style:parent-style-name="Normal" style:family="paragraph">
      <style:paragraph-properties fo:line-height="150%"/>
      <style:text-properties style:font-name="Arial" style:font-name-complex="Arial" fo:font-size="12pt" style:font-size-asian="12pt" style:font-size-complex="12pt"/>
    </style:style>
    <style:style style:name="P5" style:parent-style-name="Normal" style:family="paragraph">
      <style:paragraph-properties fo:line-height="150%"/>
      <style:text-properties style:font-name="Arial" style:font-name-complex="Arial" fo:font-size="12pt" style:font-size-asian="12pt" style:font-size-complex="12pt"/>
    </style:style>
    <style:style style:name="P6" style:parent-style-name="Normal" style:family="paragraph">
      <style:paragraph-properties fo:line-height="150%"/>
      <style:text-properties style:font-name="Arial" style:font-name-complex="Arial" fo:font-size="12pt" style:font-size-asian="12pt" style:font-size-complex="12pt"/>
    </style:style>
    <style:style style:name="P7" style:parent-style-name="Normal" style:family="paragraph">
      <style:paragraph-properties fo:line-height="150%"/>
      <style:text-properties style:font-name="Arial" style:font-name-complex="Arial" fo:font-size="12pt" style:font-size-asian="12pt" style:font-size-complex="12pt"/>
    </style:style>
    <style:style style:name="P8" style:parent-style-name="Normal" style:family="paragraph">
      <style:paragraph-properties fo:line-height="150%"/>
      <style:text-properties style:font-name="Arial" style:font-name-complex="Arial" fo:font-size="12pt" style:font-size-asian="12pt" style:font-size-complex="12pt"/>
    </style:style>
    <style:style style:name="P9" style:parent-style-name="Normal" style:family="paragraph">
      <style:paragraph-properties fo:line-height="150%"/>
      <style:text-properties style:font-name="Arial" style:font-name-complex="Arial" fo:font-size="12pt" style:font-size-asian="12pt" style:font-size-complex="12pt"/>
    </style:style>
    <style:style style:name="P10" style:parent-style-name="Normal" style:family="paragraph">
      <style:paragraph-properties fo:line-height="150%"/>
      <style:text-properties style:font-name="Arial" style:font-name-complex="Arial" fo:font-size="12pt" style:font-size-asian="12pt" style:font-size-complex="12pt"/>
    </style:style>
    <style:style style:name="P11" style:parent-style-name="Normal" style:family="paragraph">
      <style:paragraph-properties fo:line-height="150%"/>
      <style:text-properties style:font-name="Arial" style:font-name-complex="Arial" fo:font-weight="bold" style:font-weight-asian="bold" style:font-weight-complex="bold" fo:font-size="14pt" style:font-size-asian="14pt" style:font-size-complex="14pt"/>
    </style:style>
    <style:style style:name="P12" style:parent-style-name="Normal" style:family="paragraph">
      <style:paragraph-properties fo:line-height="150%"/>
      <style:text-properties style:font-name="Arial" style:font-name-complex="Arial" fo:font-weight="bold" style:font-weight-asian="bold" style:font-weight-complex="bold" fo:font-size="14pt" style:font-size-asian="14pt" style:font-size-complex="14pt"/>
    </style:style>
    <style:style style:name="P13" style:parent-style-name="Normal" style:family="paragraph">
      <style:paragraph-properties fo:line-height="150%"/>
      <style:text-properties style:font-name="Arial" style:font-name-complex="Arial" fo:font-weight="bold" style:font-weight-asian="bold" style:font-weight-complex="bold" fo:font-size="14pt" style:font-size-asian="14pt" style:font-size-complex="14pt"/>
    </style:style>
    <style:style style:name="P14" style:parent-style-name="Normal" style:family="paragraph">
      <style:paragraph-properties fo:line-height="150%"/>
      <style:text-properties style:font-name="Arial" style:font-name-complex="Arial" fo:font-weight="bold" style:font-weight-asian="bold" style:font-weight-complex="bold" fo:font-size="14pt" style:font-size-asian="14pt" style:font-size-complex="14pt"/>
    </style:style>
    <style:style style:name="P15" style:parent-style-name="Normal" style:family="paragraph">
      <style:paragraph-properties fo:line-height="150%"/>
      <style:text-properties style:font-name="Arial" style:font-name-complex="Arial" fo:font-size="12pt" style:font-size-asian="12pt" style:font-size-complex="12pt"/>
    </style:style>
    <style:style style:name="P16" style:parent-style-name="Normal" style:family="paragraph">
      <style:paragraph-properties fo:line-height="150%"/>
      <style:text-properties style:font-name="Arial" style:font-name-complex="Arial" fo:font-size="12pt" style:font-size-asian="12pt" style:font-size-complex="12pt"/>
    </style:style>
    <style:style style:name="P17" style:parent-style-name="Normal" style:family="paragraph">
      <style:paragraph-properties fo:line-height="150%"/>
      <style:text-properties style:font-name="Arial" style:font-name-complex="Arial" fo:font-size="12pt" style:font-size-asian="12pt" style:font-size-complex="12pt"/>
    </style:style>
    <style:style style:name="P18" style:parent-style-name="Normal" style:family="paragraph">
      <style:paragraph-properties fo:line-height="150%"/>
      <style:text-properties style:font-name="Arial" style:font-name-complex="Arial" fo:font-size="12pt" style:font-size-asian="12pt" style:font-size-complex="12pt"/>
    </style:style>
    <style:style style:name="P19" style:parent-style-name="Normal" style:family="paragraph">
      <style:paragraph-properties fo:line-height="150%"/>
      <style:text-properties style:font-name="Arial" style:font-name-complex="Arial" fo:font-size="12pt" style:font-size-asian="12pt" style:font-size-complex="12pt"/>
    </style:style>
    <style:style style:name="P20" style:parent-style-name="Normal" style:family="paragraph">
      <style:paragraph-properties fo:line-height="150%"/>
      <style:text-properties style:font-name="Arial" style:font-name-complex="Arial" fo:font-size="12pt" style:font-size-asian="12pt" style:font-size-complex="12pt"/>
    </style:style>
    <style:style style:name="P21" style:parent-style-name="Normal" style:family="paragraph">
      <style:paragraph-properties fo:line-height="150%"/>
      <style:text-properties style:font-name="Arial" style:font-name-complex="Arial" fo:font-size="12pt" style:font-size-asian="12pt" style:font-size-complex="12pt"/>
    </style:style>
    <style:style style:name="P22" style:parent-style-name="Normal" style:family="paragraph">
      <style:paragraph-properties fo:line-height="150%"/>
      <style:text-properties style:font-name="Arial" style:font-name-complex="Arial" fo:font-size="12pt" style:font-size-asian="12pt" style:font-size-complex="12pt"/>
    </style:style>
    <style:style style:name="P23" style:parent-style-name="Normal" style:family="paragraph">
      <style:paragraph-properties fo:line-height="150%"/>
      <style:text-properties style:font-name="Arial" style:font-name-complex="Arial" fo:font-size="12pt" style:font-size-asian="12pt" style:font-size-complex="12pt"/>
    </style:style>
    <style:style style:name="P24" style:parent-style-name="Normal" style:family="paragraph">
      <style:paragraph-properties fo:line-height="150%"/>
      <style:text-properties style:font-name="Arial" style:font-name-complex="Arial" fo:font-size="12pt" style:font-size-asian="12pt" style:font-size-complex="12pt"/>
    </style:style>
    <style:style style:name="P25" style:parent-style-name="Normal" style:family="paragraph">
      <style:paragraph-properties fo:line-height="150%"/>
    </style:style>
    <style:style style:name="T26" style:parent-style-name="DefaultParagraphFont" style:family="text">
      <style:text-properties style:font-name="Arial" style:font-name-complex="Arial" fo:font-size="12pt" style:font-size-asian="12pt" style:font-size-complex="12pt"/>
    </style:style>
    <style:style style:name="P27" style:parent-style-name="Normal" style:family="paragraph">
      <style:paragraph-properties fo:break-before="page" fo:line-height="150%"/>
      <style:text-properties style:font-name="Arial" style:font-name-complex="Arial" fo:font-weight="bold" style:font-weight-asian="bold" style:font-weight-complex="bold" fo:font-size="14pt" style:font-size-asian="14pt" style:font-size-complex="14pt"/>
    </style:style>
    <style:style style:name="P28" style:parent-style-name="Normal" style:family="paragraph">
      <style:paragraph-properties fo:line-height="150%"/>
      <style:text-properties style:font-name="Arial" style:font-name-complex="Arial" fo:font-size="12pt" style:font-size-asian="12pt" style:font-size-complex="12pt"/>
    </style:style>
    <style:style style:name="P29" style:parent-style-name="Normal" style:family="paragraph">
      <style:paragraph-properties fo:line-height="150%"/>
      <style:text-properties style:font-name="Arial" style:font-name-complex="Arial" fo:font-size="12pt" style:font-size-asian="12pt" style:font-size-complex="12pt"/>
    </style:style>
    <style:style style:name="P30" style:parent-style-name="Normal" style:family="paragraph">
      <style:paragraph-properties fo:line-height="150%"/>
      <style:text-properties style:font-name="Arial" style:font-name-complex="Arial" fo:font-size="12pt" style:font-size-asian="12pt" style:font-size-complex="12pt"/>
    </style:style>
    <style:style style:name="P31" style:parent-style-name="Normal" style:family="paragraph">
      <style:paragraph-properties fo:line-height="150%"/>
      <style:text-properties style:font-name="Arial" style:font-name-complex="Arial" fo:font-size="12pt" style:font-size-asian="12pt" style:font-size-complex="12pt"/>
    </style:style>
    <style:style style:name="P32" style:parent-style-name="Normal" style:family="paragraph">
      <style:paragraph-properties fo:break-before="page" fo:line-height="150%"/>
      <style:text-properties style:font-name="Arial" style:font-name-complex="Arial" fo:font-weight="bold" style:font-weight-asian="bold" style:font-weight-complex="bold" fo:font-size="14pt" style:font-size-asian="14pt" style:font-size-complex="14pt"/>
    </style:style>
    <style:style style:name="P33" style:parent-style-name="ListParagraph" style:list-style-name="LFO1" style:family="paragraph">
      <style:paragraph-properties fo:line-height="150%"/>
      <style:text-properties style:font-name="Arial" style:font-name-complex="Arial" fo:font-size="12pt" style:font-size-asian="12pt" style:font-size-complex="12pt"/>
    </style:style>
    <style:style style:name="P34" style:parent-style-name="ListParagraph" style:list-style-name="LFO1" style:family="paragraph">
      <style:paragraph-properties fo:line-height="150%"/>
      <style:text-properties style:font-name="Arial" style:font-name-complex="Arial" fo:font-size="12pt" style:font-size-asian="12pt" style:font-size-complex="12pt"/>
    </style:style>
    <style:style style:name="P35" style:parent-style-name="ListParagraph" style:list-style-name="LFO1" style:family="paragraph">
      <style:paragraph-properties fo:line-height="150%"/>
      <style:text-properties style:font-name="Arial" style:font-name-complex="Arial" fo:font-size="12pt" style:font-size-asian="12pt" style:font-size-complex="12pt"/>
    </style:style>
    <style:style style:name="P36" style:parent-style-name="ListParagraph" style:list-style-name="LFO1" style:family="paragraph">
      <style:paragraph-properties fo:line-height="150%"/>
      <style:text-properties style:font-name="Arial" style:font-name-complex="Arial" fo:font-size="12pt" style:font-size-asian="12pt" style:font-size-complex="12pt"/>
    </style:style>
    <style:style style:name="P37" style:parent-style-name="ListParagraph" style:list-style-name="LFO1" style:family="paragraph">
      <style:paragraph-properties fo:line-height="150%"/>
      <style:text-properties style:font-name="Arial" style:font-name-complex="Arial" fo:font-size="12pt" style:font-size-asian="12pt" style:font-size-complex="12pt"/>
    </style:style>
    <style:style style:name="P38" style:parent-style-name="ListParagraph" style:list-style-name="LFO1" style:family="paragraph">
      <style:paragraph-properties fo:line-height="150%"/>
      <style:text-properties style:font-name="Arial" style:font-name-complex="Arial" fo:font-size="12pt" style:font-size-asian="12pt" style:font-size-complex="12pt"/>
    </style:style>
    <style:style style:name="P39" style:parent-style-name="Normal" style:family="paragraph">
      <style:paragraph-properties fo:line-height="150%"/>
      <style:text-properties style:font-name="Arial" style:font-name-complex="Arial" fo:font-size="12pt" style:font-size-asian="12pt" style:font-size-complex="12pt"/>
    </style:style>
  </office:automatic-styles>
  <office:body>
    <office:text text:use-soft-page-breaks="true">
      <text:p text:style-name="P1">4. Introduction</text:p>
      <text:p text:style-name="P2">Our team developed a Smart Store Management System, a Java-based desktop application designed to help small business owners manage product inventory, track sales, and generate essential reports. The system was<text:s/>designed with ease of use, clarity and efficiency, enabling users to interact with product data through a clear and intuitive graphical interface.</text:p>
      <text:p text:style-name="P3">Initially, we approached this project as a professional software development team. We used Intellij IDEA as our primary development environment, and all our code was managed through GitHub, with direct Git integration within Intellij to commit, push, and pull code changes. This setup facilitated collaboration and allowed each team member to contribute effectively with proper version control.</text:p>
      <text:p text:style-name="P4">In addition to code management, we used Jira as a task management tool. We created user stories and monitored our progress using dashboards, which helped us assign responsibilities, monitor deadlines, and track bugs or pending features.</text:p>
      <text:p text:style-name="P5">We also created a WhatsApp account to stay connected and make decisions quickly. This allowed us to communicate in real time, ask questions, and provide instant feedback. We held four to five structured group meetings, where we discussed progress, reviewed completed work, and planned next steps. These meetings were essential for aligning our ideas, conducting joint testing, and implementing improvements collaboratively.</text:p>
      <text:p text:style-name="P6"/>
      <text:p text:style-name="P7"/>
      <text:p text:style-name="P8"/>
      <text:p text:style-name="P9"/>
      <text:p text:style-name="P10"/>
      <text:p text:style-name="P11"/>
      <text:p text:style-name="P12"/>
      <text:p text:style-name="P13"/>
      <text:soft-page-break/>
      <text:p text:style-name="P14">6. Implementation Details</text:p>
      <text:p text:style-name="P15">The Smart Store Management System was developed using Java and structured following object-oriented programming principles to ensure modularity and scalability. Our team used Intellij IDEA as the primary development environment, which provided robust features for coding, debugging, and integration with GitHub for version control. This setup allowed us to work collaboratively and efficiently track individual contributions.</text:p>
      <text:p text:style-name="P16">The core functionality was implemented using custom Java classes. The `Product` class defines item attributes such as name, price, and quantity. The `InventoryManager` class handles operations such as adding new items, updating stock, and recording sales. The `SalesRecord` class stores the details of each transaction, including date, quantity, and total value.</text:p>
      <text:p text:style-name="P17">The graphical user<text:s/>interface (GUI) was built using Java Swing, with layout managers such as `BorderLayout` and `FlowLayout` to create a structured and responsive interface. The interface includes input fields, action buttons, a dynamic product table, and a real-time search bar. Users can easily add products, record sales, and generate inventory and sales reports.</text:p>
      <text:p text:style-name="P18">To improve usability and stock control, we implemented a custom color-coding system in the product table:</text:p>
      <text:p text:style-name="P19">Red text indicates out-of-stock products (0 units)</text:p>
      <text:p text:style-name="P20">Yellow background highlights low-stock items (less than 10 units)</text:p>
      <text:p text:style-name="P21">The green background shows healthy stock levels (10 units or more)</text:p>
      <text:p text:style-name="P22">Additionally, all prices are displayed with the £ symbol for clarity, and a real-time filter allows users to perform product searches efficiently using a TableRowSorter.</text:p>
      <text:p text:style-name="P23">The system includes basic input validation using try-catch blocks to prevent incorrect entries and ensure data consistency. Feedback is provided through JOptionPane dialogs to confirm actions or report errors.</text:p>
      <text:p text:style-name="P24"/>
      <text:soft-page-break/>
      <text:p text:style-name="P25"><text:span text:style-name="T26">We organised our workflow using Jira, where we managed tasks, assigned responsibilities, and monitored issue progress. This structured development process helped the team build a functional, reliable, user-friendly system that addresses real-world inventory management needs.</text:span></text:p>
      <text:soft-page-break/>
      <text:p text:style-name="P27">8. Individual Contribution</text:p>
      <text:p text:style-name="P28">At the beginning of the project, I focused on building the application's core structure. I created the initial versions of the core Java classes, including `Product`, InventoryManager`, and `SalesRecord`. These classes were designed to define how data would be stored, manipulated, and shared within the system. This initial contribution laid the groundwork for the rest of the team to build upon.</text:p>
      <text:p text:style-name="P29">In addition, I developed a basic version of the graphical user interface (GUI) using Java Swing. While initially simple, it included essential components such as input fields, buttons, and a table to display product information. After sharing it with the team, we collaborated to improve its design. Later in the project, I implemented a visual stock indicator in the product table. Specifically, I added functionality that highlighted stock levels: it displayed red values ​​when an item was out of stock and a<text:s/>yellow background when the quantity was less than ten. This feature makes the interface more intuitive and convenient for identifying inventory that needs replenishment. The team helped further refine the visuals, making the final version more consistent with the overall style of the user interface.</text:p>
      <text:p text:style-name="P30">In addition to coding, I contributed by participating in all team meetings, helping with testing and debugging. We used Intellij IDEA connected to GitHub for version control, and I regularly submitted commits reflecting my progress. Communication with the team was fluid, especially through our WhatsApp group, where we quickly resolved doubts and made decisions as needed.</text:p>
      <text:p text:style-name="P31">This experience allowed me to make meaningful contributions to a working solution that can truly benefit users.</text:p>
      <text:soft-page-break/>
      <text:p text:style-name="P32">10. Conclusions</text:p>
      <text:list text:style-name="LFO1" text:continue-numbering="true">
        <text:list-item>
          <text:p text:style-name="P33">This system could be particularly valuable for small businesses or microentrepreneurs to track sales and inventory to make faster business decisions. This level of control can improve efficiency and potentially generate higher profits in the medium and long term.</text:p>
        </text:list-item>
        <text:list-item>
          <text:p text:style-name="P34">Team collaboration was essential. By combining our ideas and skills, we developed a more complete and professional application than what could have been achieved individually.</text:p>
        </text:list-item>
        <text:list-item>
          <text:p text:style-name="P35">Version control made a difference; using GitHub helped us manage updates, track contributions, and avoid conflicts when merging our code.</text:p>
        </text:list-item>
        <text:list-item>
          <text:p text:style-name="P36">Task organisation through Jira improved productivity. It allowed us to divide work fairly and stay on track with deadlines by assigning tasks clearly and efficiently.</text:p>
        </text:list-item>
        <text:list-item>
          <text:p text:style-name="P37">Clear communication through WhatsApp kept us connected, instant messaging helped us stay informed and solve small issues quickly without needing formal meetings every time.</text:p>
        </text:list-item>
        <text:list-item>
          <text:p text:style-name="P38">Overall, this project taught us how to work as a development team using modern tools and workflows, and how software design decisions can have a practical impact on real users.</text:p>
        </text:list-item>
      </text:list>
      <text:p text:style-name="P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ose efrain Castro castillo</meta:initial-creator>
    <dc:creator>Jose efrain Castro castillo</dc:creator>
    <meta:creation-date>2025-04-17T13:56:00Z</meta:creation-date>
    <dc:date>2025-04-17T13:56:00Z</dc:date>
    <meta:template xlink:href="Normal" xlink:type="simple"/>
    <meta:editing-cycles>2</meta:editing-cycles>
    <meta:editing-duration>PT60S</meta:editing-duration>
    <meta:user-defined meta:name="GrammarlyDocumentId">6d28f1e8-3b7e-4d4c-b32a-b79b18b7e476</meta:user-defined>
    <meta:document-statistic meta:page-count="5" meta:paragraph-count="28" meta:word-count="933" meta:character-count="6373" meta:row-count="102" meta:non-whitespace-character-count="5462"/>
  </office:meta>
</office:document-meta>
</file>